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7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upload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emini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t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sv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xls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xlsm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ds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h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zraw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peg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df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v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14:05:31.93987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16:40:29.648550600</meta:creation-date>
    <meta:editing-duration>PT20H49M37S</meta:editing-duration>
    <meta:editing-cycles>15</meta:editing-cycles>
    <meta:generator>LibreOffice/26.2.0.3$Windows_X86_64 LibreOffice_project/620$Build-3</meta:generator>
    <dc:date>2026-02-26T14:05:53.259168000</dc:date>
    <meta:document-statistic meta:table-count="1" meta:cell-count="51" meta:object-count="0"/>
  </office:meta>
</office:document-meta>
</file>